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l@val-HP:~$ VBoxManage -v</text:p>
      <text:p text:style-name="Standard">6.1.38r153438</text:p>
      <text:p text:style-name="Standard">val@val-HP:~$ vagrant -v</text:p>
      <text:p text:style-name="Standard">Vagrant 2.2.19</text:p>
      <text:p text:style-name="Standard">val@val-HP:~$ ansible --version</text:p>
      <text:p text:style-name="Standard">ansible 2.10.8</text:p>
      <text:p text:style-name="Standard"><text:s text:c="2"/>config file = None</text:p>
      <text:p text:style-name="Standard"><text:s text:c="2"/>configured module search path = ['/home/val/.ansible/plugins/modules', '/usr/share/ansible/plugins/modules']</text:p>
      <text:p text:style-name="Standard"><text:s text:c="2"/>ansible python module location = /usr/lib/python3/dist-packages/ansible</text:p>
      <text:p text:style-name="Standard"><text:s text:c="2"/>executable location = /usr/bin/ansible</text:p>
      <text:p text:style-name="Standard"><text:s text:c="2"/>python version = 3.10.4 (main, Jun 29 2022, 12:14:53) [GCC 11.2.0]</text:p>
      <text:p text:style-name="Standard">val@val-HP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1:57:39.238750701</meta:creation-date>
    <dc:date>2022-09-15T21:58:18.353908951</dc:date>
    <meta:editing-duration>PT40S</meta:editing-duration>
    <meta:editing-cycles>1</meta:editing-cycles>
    <meta:document-statistic meta:table-count="0" meta:image-count="0" meta:object-count="0" meta:page-count="1" meta:paragraph-count="12" meta:word-count="48" meta:character-count="448" meta:non-whitespace-character-count="402"/>
    <meta:generator>LibreOffice/7.3.5.2$Linux_X86_64 LibreOffice_project/30$Build-2</meta:generator>
  </office:meta>
</office:document-meta>
</file>